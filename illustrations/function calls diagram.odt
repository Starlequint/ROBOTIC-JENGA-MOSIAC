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Main Function:</text:p>
      <text:p text:style-name="P1"><text:s text:c="2"/>├── release()<text:line-break/> <text:s/>│ <text:s text:c="2"/>├── initGripper(router)<text:line-break/> <text:s/>│ <text:s text:c="2"/>└── gripper.open()<text:line-break/> <text:s/>├── plankDetection()<text:line-break/> <text:s/>│ <text:s text:c="2"/>├── getImage()<text:line-break/> <text:s/>│ <text:s text:c="2"/>│ <text:s text:c="2"/>├── move(CAMERA, CAMERA_o, True)<text:line-break/> <text:s/>│ <text:s text:c="2"/>│ <text:s text:c="2"/>│ <text:s text:c="2"/>├── inBoundary(position)<text:line-break/> <text:s/>│ <text:s text:c="2"/>│ <text:s text:c="2"/>│ <text:s text:c="2"/>└── mv(args, x, y, z, ox, oy, oz)<text:line-break/> <text:s/>│ <text:s text:c="2"/>│ <text:s text:c="2"/>│ <text:s text:c="6"/>└── example_cartesian_action_movement(base, base_cyclic, x/l, y/l, z/l, ox/l, oy/l, oz/l)<text:line-break/> <text:s/>│ <text:s text:c="2"/>│ <text:s text:c="2"/>└── get_single_frame(rtsp_url)<text:line-break/> <text:s/>│ <text:s text:c="2"/>├── save(rawImage, rawImagePath)<text:line-break/> <text:s/>│ <text:s text:c="2"/>├── save(colourImage, colourImagePath)<text:line-break/> <text:s/>│ <text:s text:c="2"/>└── detect_planks(raw_image_path, color_image_path)<text:line-break/> <text:s/>│ <text:s text:c="8"/>├── detect_canny(...)<text:line-break/> <text:s/>│ <text:s text:c="8"/>├── detect_canny(...)<text:line-break/> <text:s/>│ <text:s text:c="8"/>├── detect_sobel(...)<text:line-break/> <text:s/>│ <text:s text:c="8"/>├── detect_sobel(...)<text:line-break/> <text:s/>│ <text:s text:c="8"/>├── detect_sobel(...)<text:line-break/> <text:s/>│ <text:s text:c="8"/>├── detect_sobel(...)<text:line-break/> <text:s/>│ <text:s text:c="8"/>├── merge_all(...)<text:line-break/> <text:s/>│ <text:s text:c="8"/>└── _dark_pixel_ratio(raw_gray, c[8])<text:line-break/> <text:s/>├── recognizePattern(rawData, bricks)<text:line-break/> <text:s/>│ <text:s text:c="2"/>└── patternRecognition(rawData)<text:line-break/> <text:s/>│ <text:s text:c="8"/>├── is_plausible_triangle(p1, p2, p3)<text:line-break/> <text:s/>│ <text:s text:c="8"/>│ <text:s text:c="2"/>└── triangle_aspect(p1, p2, p3)<text:line-break/> <text:s/>│ <text:s text:c="8"/>├── is_valid_size(p1, p2, p3)<text:line-break/> <text:s/>│ <text:s text:c="8"/>├── is_valid_rotation(p1, p2)<text:line-break/> <text:s/>│ <text:s text:c="8"/>├── is_valid_rotation(p1, p3)<text:line-break/> <text:s/>│ <text:s text:c="8"/>└── is_valid_rotation(p2, p3)<text:line-break/>Loop:<text:line-break/> <text:s/>├── movePlank(moves[i])<text:line-break/> <text:s/>│ <text:s text:c="2"/>├── move(...)<text:line-break/> <text:s/>│ <text:s text:c="2"/>│ <text:s text:c="2"/>└── ...<text:line-break/> <text:s/>│ <text:s text:c="2"/>├── catch()<text:line-break/> <text:s/>│ <text:s text:c="2"/>│ <text:s text:c="2"/>├── initGripper(router)<text:line-break/> <text:s/>│ <text:s text:c="2"/>│ <text:s text:c="2"/>└── gripper.close(1 - Brick.WIDTH / GRIPPER_WIDTH)<text:line-break/> <text:s/>│ <text:s text:c="2"/>├── move(...)<text:line-break/> <text:s/>│ <text:s text:c="2"/>│ <text:s text:c="2"/>└── ...<text:line-break/> <text:s/>│ <text:s text:c="2"/>├── release()<text:line-break/> <text:s/>│ <text:s text:c="2"/>│ <text:s text:c="2"/>└── ...<text:line-break/> <text:s/>│ <text:s text:c="2"/>└── move(...)<text:line-break/> <text:s/>│ <text:s text:c="8"/>└── ...<text:line-break/> <text:s/>// the following calls correspond to the disabled feedback<text:line-break/> <text:s/>├── plankDetection()<text:line-break/> <text:s/>│ <text:s text:c="2"/>└── ...<text:line-break/> <text:s/>├── plankPlaced(moves[i].start, currentPlanks)<text:line-break/> <text:s/>├── findMisplaced(moves[i].start, currentPlanks)<text:line-break/> <text:s/>└── movePlank(move)<text:line-break/> <text:s text:c="6"/>└── ..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ctor Lancieux</meta:initial-creator>
    <meta:creation-date>2026-04-10T01:36:48.97</meta:creation-date>
    <meta:document-statistic meta:table-count="0" meta:image-count="0" meta:object-count="0" meta:page-count="1" meta:paragraph-count="2" meta:word-count="193" meta:character-count="1713"/>
    <dc:date>2026-04-10T11:59:54.20</dc:date>
    <dc:creator>Victor Lancieux</dc:creator>
    <meta:editing-duration>PT8H52M34S</meta:editing-duration>
    <meta:editing-cycles>1</meta:editing-cycles>
    <meta:generator>OpenOffice/4.1.15$Win32 OpenOffice.org_project/4115m2$Build-9813</meta:generator>
  </office:meta>
</office:document-meta>
</file>